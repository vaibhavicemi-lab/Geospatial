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C0000017C6B31E494ACE73B0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019cm" fo:margin-right="0cm" fo:margin-top="0.289cm" fo:margin-bottom="0cm" style:contextual-spacing="false" fo:line-height="150%" fo:text-align="center" style:justify-single-word="false" fo:text-indent="0cm" style:auto-text-indent="false"/>
      <style:text-properties fo:color="#000000" loext:opacity="100%" officeooo:rsid="001e8121" officeooo:paragraph-rsid="000a4095"/>
    </style:style>
    <style:style style:name="P2" style:family="paragraph" style:parent-style-name="Heading_20_2">
      <style:paragraph-properties fo:margin-left="0cm" fo:margin-right="0.009cm" fo:margin-top="0.365cm" fo:margin-bottom="0cm" style:contextual-spacing="false" fo:line-height="150%" fo:text-indent="0cm" style:auto-text-indent="false"/>
      <style:text-properties fo:color="#000000" loext:opacity="100%" officeooo:rsid="001e8121" officeooo:paragraph-rsid="000a4095"/>
    </style:style>
    <style:style style:name="P3" style:family="paragraph" style:parent-style-name="Heading_20_2">
      <style:paragraph-properties fo:margin-left="0cm" fo:margin-right="0.009cm" fo:margin-top="0.365cm" fo:margin-bottom="0cm" style:contextual-spacing="false" fo:line-height="150%" fo:text-indent="0cm" style:auto-text-indent="false"/>
      <style:text-properties officeooo:rsid="001e8121" officeooo:paragraph-rsid="000a4095"/>
    </style:style>
    <style:style style:name="P4" style:family="paragraph" style:parent-style-name="Heading_20_2">
      <style:paragraph-properties fo:text-align="center" style:justify-single-word="false"/>
      <style:text-properties fo:font-size="18pt" fo:font-weight="bold" officeooo:paragraph-rsid="000a4095" style:font-size-asian="18pt" style:font-weight-asian="bold" style:font-size-complex="18pt" style:font-weight-complex="bold"/>
    </style:style>
    <style:style style:name="P5" style:family="paragraph" style:parent-style-name="Heading_20_2">
      <style:paragraph-properties fo:text-align="center" style:justify-single-word="false"/>
      <style:text-properties fo:font-size="14pt" officeooo:paragraph-rsid="000a4095" style:font-size-asian="14pt" style:font-size-complex="14pt"/>
    </style:style>
    <style:style style:name="P6" style:family="paragraph" style:parent-style-name="Heading_20_2">
      <style:text-properties officeooo:paragraph-rsid="000a4095"/>
    </style:style>
    <style:style style:name="P7" style:family="paragraph" style:parent-style-name="Heading_20_3">
      <style:paragraph-properties fo:margin-left="0.019cm" fo:margin-right="0cm" fo:margin-top="0.152cm" fo:margin-bottom="0cm" style:contextual-spacing="false" fo:text-align="start" style:justify-single-word="false" fo:text-indent="0cm" style:auto-text-indent="false"/>
      <style:text-properties officeooo:paragraph-rsid="000a4095"/>
    </style:style>
    <style:style style:name="P8" style:family="paragraph" style:parent-style-name="Heading_20_3">
      <style:paragraph-properties fo:margin-left="0.019cm" fo:margin-right="0cm" fo:margin-top="0.289cm" fo:margin-bottom="0cm" style:contextual-spacing="false" fo:line-height="150%" fo:text-align="start" style:justify-single-word="false" fo:text-indent="0cm" style:auto-text-indent="false"/>
      <style:text-properties fo:color="#000000" loext:opacity="100%" officeooo:rsid="001e8121" officeooo:paragraph-rsid="000a4095"/>
    </style:style>
    <style:style style:name="P9" style:family="paragraph" style:parent-style-name="Heading_20_3">
      <style:paragraph-properties fo:margin-left="0cm" fo:margin-right="0cm" fo:margin-top="0.289cm" fo:margin-bottom="0cm" style:contextual-spacing="false" fo:line-height="150%" fo:text-align="center" style:justify-single-word="false" fo:text-indent="0cm" style:auto-text-indent="false"/>
      <style:text-properties fo:color="#000000" loext:opacity="100%" officeooo:rsid="001e8121" officeooo:paragraph-rsid="000a4095"/>
    </style:style>
    <style:style style:name="P10" style:family="paragraph" style:parent-style-name="Heading_20_3">
      <style:paragraph-properties fo:margin-left="0.019cm" fo:margin-right="0cm" fo:margin-top="0.152cm" fo:margin-bottom="0cm" style:contextual-spacing="false" fo:text-align="start" style:justify-single-word="false" fo:text-indent="0cm" style:auto-text-indent="false"/>
      <style:text-properties fo:color="#000000" loext:opacity="100%" fo:font-weight="normal" officeooo:paragraph-rsid="000a4095" style:font-weight-asian="normal" style:font-weight-complex="normal"/>
    </style:style>
    <style:style style:name="P11" style:family="paragraph" style:parent-style-name="Standard">
      <style:paragraph-properties fo:margin-left="0.279cm" fo:margin-right="0.009cm" fo:margin-top="0.365cm" fo:margin-bottom="0cm" style:contextual-spacing="false" fo:line-height="150%" fo:text-align="center" style:justify-single-word="false" fo:text-indent="0cm" style:auto-text-indent="false"/>
      <style:text-properties fo:font-size="14pt" officeooo:rsid="00230aa3" officeooo:paragraph-rsid="000a4095" style:font-size-asian="14pt" style:font-size-complex="14pt"/>
    </style:style>
    <style:style style:name="P12" style:family="paragraph" style:parent-style-name="Standard">
      <style:paragraph-properties fo:text-align="center" style:justify-single-word="false"/>
      <style:text-properties fo:font-size="14pt" officeooo:paragraph-rsid="000a4095" style:font-size-asian="14pt" style:font-size-complex="14pt"/>
    </style:style>
    <style:style style:name="P13" style:family="paragraph" style:parent-style-name="Standard">
      <style:paragraph-properties fo:text-align="center" style:justify-single-word="false"/>
      <style:text-properties fo:font-size="14pt" officeooo:rsid="000fd966" officeooo:paragraph-rsid="000a4095" style:font-size-asian="14pt" style:font-size-complex="14pt"/>
    </style:style>
    <style:style style:name="P14" style:family="paragraph" style:parent-style-name="Standard">
      <style:paragraph-properties fo:text-align="end" style:justify-single-word="false"/>
      <style:text-properties fo:font-size="14pt" officeooo:rsid="000fd966" officeooo:paragraph-rsid="000a4095" style:font-size-asian="14pt" style:font-size-complex="14pt"/>
    </style:style>
    <style:style style:name="P15" style:family="paragraph" style:parent-style-name="Standard">
      <style:paragraph-properties fo:text-align="end" style:justify-single-word="false"/>
      <style:text-properties fo:font-size="14pt" officeooo:rsid="0010f42a" officeooo:paragraph-rsid="000a4095" style:font-size-asian="14pt" style:font-size-complex="14pt"/>
    </style:style>
    <style:style style:name="P16" style:family="paragraph" style:parent-style-name="Standard">
      <style:paragraph-properties fo:text-align="end" style:justify-single-word="false"/>
      <style:text-properties fo:font-size="14pt" officeooo:rsid="001100bc" officeooo:paragraph-rsid="000a4095" style:font-size-asian="14pt" style:font-size-complex="14pt"/>
    </style:style>
    <style:style style:name="P17" style:family="paragraph" style:parent-style-name="Standard">
      <style:paragraph-properties fo:text-align="end" style:justify-single-word="false"/>
      <style:text-properties fo:font-size="14pt" officeooo:rsid="0011b719" officeooo:paragraph-rsid="000a4095" style:font-size-asian="14pt" style:font-size-complex="14pt"/>
    </style:style>
    <style:style style:name="P18" style:family="paragraph" style:parent-style-name="Standard">
      <style:paragraph-properties fo:text-align="end" style:justify-single-word="false"/>
      <style:text-properties fo:font-size="14pt" officeooo:rsid="0011f98c" officeooo:paragraph-rsid="000a4095" style:font-size-asian="14pt" style:font-size-complex="14pt"/>
    </style:style>
    <style:style style:name="P19" style:family="paragraph" style:parent-style-name="Standard">
      <style:paragraph-properties fo:text-align="justify" style:justify-single-word="false"/>
      <style:text-properties fo:font-size="14pt" officeooo:rsid="0011f98c" officeooo:paragraph-rsid="000a4095" style:font-size-asian="14pt" style:font-size-complex="14pt"/>
    </style:style>
    <style:style style:name="P20" style:family="paragraph" style:parent-style-name="Standard">
      <style:paragraph-properties fo:text-align="center" style:justify-single-word="false"/>
      <style:text-properties fo:font-size="14pt" officeooo:rsid="0011f98c" officeooo:paragraph-rsid="000a4095" style:font-size-asian="14pt" style:font-size-complex="14pt"/>
    </style:style>
    <style:style style:name="P21" style:family="paragraph" style:parent-style-name="Standard">
      <style:paragraph-properties fo:text-align="justify" style:justify-single-word="false"/>
      <style:text-properties fo:font-size="14pt" officeooo:rsid="00130750" officeooo:paragraph-rsid="000a4095" style:font-size-asian="14pt" style:font-size-complex="14pt"/>
    </style:style>
    <style:style style:name="P22" style:family="paragraph" style:parent-style-name="Standard">
      <style:paragraph-properties fo:text-align="justify" style:justify-single-word="false"/>
      <style:text-properties fo:font-size="14pt" officeooo:rsid="0014af35" officeooo:paragraph-rsid="000a4095" style:font-size-asian="14pt" style:font-size-complex="14pt"/>
    </style:style>
    <style:style style:name="P23" style:family="paragraph" style:parent-style-name="Standard">
      <style:paragraph-properties fo:text-align="justify" style:justify-single-word="false"/>
      <style:text-properties fo:font-size="14pt" officeooo:rsid="0015fd07" officeooo:paragraph-rsid="000a4095" style:font-size-asian="14pt" style:font-size-complex="14pt"/>
    </style:style>
    <style:style style:name="P24" style:family="paragraph" style:parent-style-name="Standard">
      <style:text-properties fo:font-size="14pt" officeooo:paragraph-rsid="000a4095" style:font-size-asian="14pt" style:font-size-complex="14pt"/>
    </style:style>
    <style:style style:name="P25" style:family="paragraph" style:parent-style-name="Standard">
      <style:paragraph-properties fo:text-align="end" style:justify-single-word="false"/>
      <style:text-properties fo:font-size="14pt" officeooo:rsid="000a4095" officeooo:paragraph-rsid="000a4095" style:font-size-asian="14pt" style:font-size-complex="14pt"/>
    </style:style>
    <style:style style:name="P26" style:family="paragraph" style:parent-style-name="Standard">
      <style:text-properties fo:font-size="14pt" fo:font-weight="bold" officeooo:paragraph-rsid="000a4095" style:font-size-asian="14pt" style:font-weight-asian="bold" style:font-size-complex="14pt" style:font-weight-complex="bold"/>
    </style:style>
    <style:style style:name="P27" style:family="paragraph" style:parent-style-name="Standard">
      <style:paragraph-properties fo:margin-left="0.279cm" fo:margin-right="0.019cm" fo:margin-top="0.002cm" fo:margin-bottom="0cm" style:contextual-spacing="false" fo:line-height="150%" fo:text-align="center" style:justify-single-word="false" fo:text-indent="0cm" style:auto-text-indent="false"/>
      <style:text-properties officeooo:rsid="001e8121" officeooo:paragraph-rsid="000a4095"/>
    </style:style>
    <style:style style:name="P28" style:family="paragraph" style:parent-style-name="Standard">
      <style:paragraph-properties fo:margin-left="0.279cm" fo:margin-right="0.266cm" fo:margin-top="0.39cm" fo:margin-bottom="0cm" style:contextual-spacing="false" fo:line-height="150%" fo:text-align="start" style:justify-single-word="false" fo:text-indent="0cm" style:auto-text-indent="false"/>
      <style:text-properties fo:color="#000000" loext:opacity="100%" officeooo:rsid="001e8121" officeooo:paragraph-rsid="000a4095"/>
    </style:style>
    <style:style style:name="P29" style:family="paragraph" style:parent-style-name="Standard">
      <style:paragraph-properties fo:margin-left="0.279cm" fo:margin-right="0.266cm" fo:margin-top="0.39cm" fo:margin-bottom="0cm" style:contextual-spacing="false" fo:line-height="150%" fo:text-align="justify" style:justify-single-word="false" fo:text-indent="0cm" style:auto-text-indent="false"/>
      <style:text-properties fo:color="#000000" loext:opacity="100%" officeooo:rsid="001e8121" officeooo:paragraph-rsid="000a4095"/>
    </style:style>
    <style:style style:name="P30" style:family="paragraph" style:parent-style-name="Standard">
      <style:paragraph-properties fo:margin-left="0.279cm" fo:margin-right="0.266cm" fo:margin-top="0.39cm" fo:margin-bottom="0cm" style:contextual-spacing="false" fo:line-height="150%" fo:text-align="center" style:justify-single-word="false" fo:text-indent="0cm" style:auto-text-indent="false"/>
      <style:text-properties fo:color="#000000" loext:opacity="100%" officeooo:rsid="001e8121" officeooo:paragraph-rsid="000a4095"/>
    </style:style>
    <style:style style:name="P31" style:family="paragraph" style:parent-style-name="Standard">
      <style:paragraph-properties fo:margin-left="0.279cm" fo:margin-right="0.266cm" fo:margin-top="0.39cm" fo:margin-bottom="0cm" style:contextual-spacing="false" fo:line-height="150%" fo:text-align="start" style:justify-single-word="false" fo:text-indent="0cm" style:auto-text-indent="false"/>
      <style:text-properties fo:color="#000000" loext:opacity="100%" officeooo:rsid="001ff672" officeooo:paragraph-rsid="000a4095"/>
    </style:style>
    <style:style style:name="P32" style:family="paragraph" style:parent-style-name="Standard">
      <style:paragraph-properties fo:text-align="center" style:justify-single-word="false"/>
      <style:text-properties fo:font-size="18pt" fo:font-weight="bold" officeooo:rsid="000fd966" officeooo:paragraph-rsid="000a4095" style:font-size-asian="18pt" style:font-weight-asian="bold" style:font-size-complex="18pt" style:font-weight-complex="bold"/>
    </style:style>
    <style:style style:name="P33" style:family="paragraph" style:parent-style-name="Standard">
      <style:paragraph-properties fo:text-align="center" style:justify-single-word="false"/>
      <style:text-properties fo:font-size="18pt" fo:font-weight="bold" officeooo:rsid="0011f98c" officeooo:paragraph-rsid="000a4095" style:font-size-asian="18pt" style:font-weight-asian="bold" style:font-size-complex="18pt" style:font-weight-complex="bold"/>
    </style:style>
    <style:style style:name="P34" style:family="paragraph" style:parent-style-name="Standard">
      <style:paragraph-properties fo:text-align="center" style:justify-single-word="false"/>
      <style:text-properties fo:font-size="18pt" fo:font-weight="bold" officeooo:rsid="0017007f" officeooo:paragraph-rsid="000a4095" style:font-size-asian="18pt" style:font-weight-asian="bold" style:font-size-complex="18pt" style:font-weight-complex="bold"/>
    </style:style>
    <style:style style:name="P35" style:family="paragraph" style:parent-style-name="Standard">
      <style:paragraph-properties fo:text-align="justify" style:justify-single-word="false"/>
      <style:text-properties fo:font-size="12pt" fo:font-weight="normal" officeooo:rsid="0017007f" officeooo:paragraph-rsid="000a4095"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18decf" officeooo:paragraph-rsid="000a4095"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1a41c9" officeooo:paragraph-rsid="000a4095" style:font-size-asian="12pt" style:font-weight-asian="normal" style:font-size-complex="12pt" style:font-weight-complex="normal"/>
    </style:style>
    <style:style style:name="P38" style:family="paragraph" style:parent-style-name="Standard">
      <style:paragraph-properties fo:margin-left="0.279cm" fo:margin-right="0.266cm" fo:margin-top="0.39cm" fo:margin-bottom="0cm" style:contextual-spacing="false" fo:text-indent="0cm" style:auto-text-indent="false"/>
      <style:text-properties officeooo:paragraph-rsid="000a4095"/>
    </style:style>
    <style:style style:name="P39" style:family="paragraph" style:parent-style-name="Text_20_body">
      <style:paragraph-properties fo:margin-left="0.279cm" fo:margin-right="0.266cm" fo:margin-top="0.39cm" fo:margin-bottom="0cm" style:contextual-spacing="false" fo:line-height="150%" fo:text-align="justify" style:justify-single-word="false" fo:text-indent="0cm" style:auto-text-indent="false"/>
      <style:text-properties fo:color="#000000" loext:opacity="100%" officeooo:rsid="001e8121" officeooo:paragraph-rsid="000a4095"/>
    </style:style>
    <style:style style:name="P40" style:family="paragraph" style:parent-style-name="Text_20_body">
      <style:paragraph-properties fo:text-align="justify" style:justify-single-word="false"/>
      <style:text-properties officeooo:paragraph-rsid="000a4095"/>
    </style:style>
    <style:style style:name="P41" style:family="paragraph" style:parent-style-name="Text_20_body">
      <style:paragraph-properties fo:text-align="justify" style:justify-single-word="false"/>
      <style:text-properties fo:font-size="14pt" style:text-underline-style="none" fo:font-weight="normal" officeooo:paragraph-rsid="000a4095" style:font-size-asian="14pt" style:font-weight-asian="normal" style:font-size-complex="14pt" style:font-weight-complex="normal"/>
    </style:style>
    <style:style style:name="P42" style:family="paragraph" style:parent-style-name="Text_20_body">
      <style:paragraph-properties fo:text-align="justify" style:justify-single-word="false"/>
      <style:text-properties fo:font-size="14pt" officeooo:paragraph-rsid="000a4095" style:font-size-asian="14pt" style:font-size-complex="14pt"/>
    </style:style>
    <style:style style:name="T1" style:family="text">
      <style:text-properties fo:color="#000000" loext:opacity="100%" fo:font-size="12pt" fo:letter-spacing="-0.009cm" fo:font-weight="normal" officeooo:rsid="001e8121" style:font-size-asian="12pt" style:font-weight-asian="normal" style:font-size-complex="12pt" style:font-weight-complex="normal"/>
    </style:style>
    <style:style style:name="T2" style:family="text">
      <style:text-properties fo:color="#000000" loext:opacity="100%" fo:font-size="12pt" fo:letter-spacing="-0.009cm" fo:font-weight="normal" style:font-size-asian="12pt" style:font-weight-asian="normal" style:font-size-complex="12pt" style:font-weight-complex="normal"/>
    </style:style>
    <style:style style:name="T3" style:family="text">
      <style:text-properties fo:color="#000000" loext:opacity="100%" fo:font-size="14pt" fo:letter-spacing="-0.009cm" style:text-underline-style="none" fo:font-weight="normal" officeooo:rsid="001e8121" style:font-size-asian="14pt" style:font-weight-asian="normal" style:font-size-complex="14pt" style:font-weight-complex="normal"/>
    </style:style>
    <style:style style:name="T4" style:family="text">
      <style:text-properties fo:color="#000000" loext:opacity="100%" fo:letter-spacing="-0.009cm" fo:font-weight="bold" officeooo:rsid="0020959b" style:font-weight-asian="bold" style:font-weight-complex="normal"/>
    </style:style>
    <style:style style:name="T5" style:family="text">
      <style:text-properties fo:color="#000000" loext:opacity="100%" fo:letter-spacing="-0.009cm" fo:font-weight="bold" officeooo:rsid="001e8121" style:font-weight-asian="bold" style:font-weight-complex="normal"/>
    </style:style>
    <style:style style:name="T6" style:family="text">
      <style:text-properties fo:color="#000000" loext:opacity="100%" fo:letter-spacing="-0.009cm" officeooo:rsid="001e8121"/>
    </style:style>
    <style:style style:name="T7" style:family="text">
      <style:text-properties fo:color="#000000" loext:opacity="100%" fo:letter-spacing="-0.009cm"/>
    </style:style>
    <style:style style:name="T8" style:family="text">
      <style:text-properties fo:color="#000000" loext:opacity="100%" fo:letter-spacing="-0.009cm" officeooo:rsid="0018decf"/>
    </style:style>
    <style:style style:name="T9" style:family="text">
      <style:text-properties fo:color="#000000" loext:opacity="100%" fo:letter-spacing="-0.009cm" officeooo:rsid="001a41c9"/>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style:use-window-font-color="true" loext:opacity="0%" fo:font-size="16pt" fo:font-weight="bold" style:font-size-asian="16pt" style:font-weight-asian="bold" style:font-size-complex="16pt"/>
    </style:style>
    <style:style style:name="T14" style:family="text">
      <style:text-properties style:use-window-font-color="true" loext:opacity="0%" fo:font-size="16pt" fo:letter-spacing="-0.044cm" fo:font-weight="bold" style:font-size-asian="16pt" style:font-weight-asian="bold" style:font-size-complex="16pt"/>
    </style:style>
    <style:style style:name="T15" style:family="text">
      <style:text-properties style:use-window-font-color="true" loext:opacity="0%" fo:font-size="16pt" fo:letter-spacing="-0.039cm" fo:font-weight="bold" style:font-size-asian="16pt" style:font-weight-asian="bold" style:font-size-complex="16pt"/>
    </style:style>
    <style:style style:name="T16" style:family="text">
      <style:text-properties style:use-window-font-color="true" loext:opacity="0%" fo:font-size="16pt" fo:letter-spacing="-0.004cm" fo:font-weight="bold" style:font-size-asian="16pt" style:font-weight-asian="bold" style:font-size-complex="16pt"/>
    </style:style>
    <style:style style:name="T17" style:family="text">
      <style:text-properties style:use-window-font-color="true" loext:opacity="0%" fo:font-weight="bold" style:font-weight-asian="bold"/>
    </style:style>
    <style:style style:name="T18" style:family="text">
      <style:text-properties style:use-window-font-color="true" loext:opacity="0%" fo:font-size="14pt" fo:letter-spacing="-0.009cm" style:text-underline-style="none" fo:font-weight="normal" style:font-size-asian="14pt" style:font-weight-asian="normal" style:font-size-complex="14pt" style:font-weight-complex="normal"/>
    </style:style>
    <style:style style:name="T19" style:family="text">
      <style:text-properties fo:color="#006fc0" loext:opacity="100%"/>
    </style:style>
    <style:style style:name="T20" style:family="text">
      <style:text-properties fo:color="#006fc0" loext:opacity="100%" fo:letter-spacing="-0.026cm"/>
    </style:style>
    <style:style style:name="T21" style:family="text">
      <style:text-properties fo:color="#006fc0" loext:opacity="100%" fo:letter-spacing="-0.009cm"/>
    </style:style>
    <style:style style:name="T22" style:family="text">
      <style:text-properties fo:letter-spacing="-0.009cm" fo:font-weight="bold" style:font-weight-asian="bold"/>
    </style:style>
    <style:style style:name="T23" style:family="text">
      <style:text-properties fo:letter-spacing="-0.009cm" fo:font-weight="bold" style:font-weight-asian="bold" style:font-weight-complex="bold"/>
    </style:style>
    <style:style style:name="T24" style:family="text">
      <style:text-properties fo:letter-spacing="-0.009cm"/>
    </style:style>
    <style:style style:name="T25" style:family="text">
      <style:text-properties fo:font-size="14pt" fo:letter-spacing="-0.009cm" fo:font-weight="bold" style:font-size-asian="14pt" style:font-weight-asian="bold"/>
    </style:style>
    <style:style style:name="T26" style:family="text">
      <style:text-properties fo:font-size="14pt" fo:letter-spacing="-0.009cm" fo:font-weight="bold" style:font-size-asian="14pt" style:font-weight-asian="bold" style:font-size-complex="14pt" style:font-weight-complex="normal"/>
    </style:style>
    <style:style style:name="T27" style:family="text">
      <style:text-properties fo:font-size="14pt" fo:letter-spacing="-0.009cm" style:font-size-asian="14pt" style:font-size-complex="16pt"/>
    </style:style>
    <style:style style:name="T28" style:family="text">
      <style:text-properties fo:font-size="14pt" fo:letter-spacing="-0.009cm" style:text-underline-style="none" fo:font-weight="normal" style:font-size-asian="14pt" style:font-weight-asian="normal" style:font-size-complex="14pt" style:font-weight-complex="normal"/>
    </style:style>
    <style:style style:name="T29" style:family="text">
      <style:text-properties fo:font-size="14pt" fo:letter-spacing="-0.009cm" style:text-underline-style="none" fo:font-weight="normal" officeooo:rsid="001ff672" style:font-size-asian="14pt" style:font-weight-asian="normal" style:font-size-complex="14pt" style:font-weight-complex="normal"/>
    </style:style>
    <style:style style:name="T30" style:family="text">
      <style:text-properties fo:font-size="14pt" fo:letter-spacing="-0.009cm" style:text-underline-style="none" fo:font-weight="normal" officeooo:rsid="0020959b" style:font-size-asian="14pt" style:font-weight-asian="normal" style:font-size-complex="14pt" style:font-weight-complex="normal"/>
    </style:style>
    <style:style style:name="T31" style:family="text">
      <style:text-properties fo:font-size="14pt" fo:letter-spacing="-0.009cm" fo:font-weight="normal" style:font-size-asian="14pt" style:font-weight-asian="normal" style:font-size-complex="16pt" style:font-weight-complex="normal"/>
    </style:style>
    <style:style style:name="T32" style:family="text">
      <style:text-properties fo:font-size="14pt" fo:letter-spacing="-0.023cm" fo:font-weight="bold" style:font-size-asian="14pt" style:font-weight-asian="bold"/>
    </style:style>
    <style:style style:name="T33" style:family="text">
      <style:text-properties fo:font-size="14pt" fo:letter-spacing="-0.023cm" style:font-size-asian="14pt" style:font-size-complex="16pt"/>
    </style:style>
    <style:style style:name="T34" style:family="text">
      <style:text-properties fo:font-size="14pt" fo:letter-spacing="-0.023cm" fo:font-weight="normal" style:font-size-asian="14pt" style:font-weight-asian="normal" style:font-size-complex="16pt" style:font-weight-complex="normal"/>
    </style:style>
    <style:style style:name="T35" style:family="text">
      <style:text-properties fo:font-size="14pt" fo:letter-spacing="-0.019cm" fo:font-weight="bold" style:font-size-asian="14pt" style:font-weight-asian="bold"/>
    </style:style>
    <style:style style:name="T36" style:family="text">
      <style:text-properties fo:font-size="14pt" fo:letter-spacing="-0.019cm" style:font-size-asian="14pt" style:font-size-complex="16pt"/>
    </style:style>
    <style:style style:name="T37" style:family="text">
      <style:text-properties fo:font-size="14pt" fo:letter-spacing="-0.019cm" fo:font-weight="normal" style:font-size-asian="14pt" style:font-weight-asian="normal" style:font-size-complex="16pt" style:font-weight-complex="normal"/>
    </style:style>
    <style:style style:name="T38" style:family="text">
      <style:text-properties fo:font-size="14pt" fo:letter-spacing="-0.016cm" fo:font-weight="bold" style:font-size-asian="14pt" style:font-weight-asian="bold"/>
    </style:style>
    <style:style style:name="T39" style:family="text">
      <style:text-properties fo:font-size="14pt" fo:letter-spacing="-0.016cm" style:font-size-asian="14pt" style:font-size-complex="16pt"/>
    </style:style>
    <style:style style:name="T40" style:family="text">
      <style:text-properties fo:font-size="14pt" fo:letter-spacing="-0.016cm" fo:font-weight="normal" style:font-size-asian="14pt" style:font-weight-asian="normal" style:font-size-complex="16pt" style:font-weight-complex="normal"/>
    </style:style>
    <style:style style:name="T41" style:family="text">
      <style:text-properties fo:font-size="14pt" fo:letter-spacing="-0.028cm" fo:font-weight="bold" style:font-size-asian="14pt" style:font-weight-asian="bold"/>
    </style:style>
    <style:style style:name="T42" style:family="text">
      <style:text-properties fo:font-size="14pt" fo:letter-spacing="-0.028cm" style:font-size-asian="14pt" style:font-size-complex="16pt"/>
    </style:style>
    <style:style style:name="T43" style:family="text">
      <style:text-properties fo:font-size="14pt" fo:letter-spacing="-0.028cm" officeooo:rsid="001a9f58" style:font-size-asian="14pt" style:font-size-complex="16pt"/>
    </style:style>
    <style:style style:name="T44" style:family="text">
      <style:text-properties fo:font-size="14pt" fo:letter-spacing="-0.028cm" fo:font-weight="normal" style:font-size-asian="14pt" style:font-weight-asian="normal" style:font-size-complex="16pt" style:font-weight-complex="normal"/>
    </style:style>
    <style:style style:name="T45" style:family="text">
      <style:text-properties fo:font-size="14pt" fo:letter-spacing="-0.028cm" fo:font-weight="normal" officeooo:rsid="001a9f58" style:font-size-asian="14pt" style:font-weight-asian="normal" style:font-size-complex="16pt" style:font-weight-complex="normal"/>
    </style:style>
    <style:style style:name="T46" style:family="text">
      <style:text-properties fo:font-size="14pt" style:text-underline-style="none" fo:font-weight="normal" style:font-size-asian="14pt" style:font-weight-asian="normal" style:font-size-complex="14pt" style:font-weight-complex="normal"/>
    </style:style>
    <style:style style:name="T47" style:family="text">
      <style:text-properties fo:font-size="14pt" style:font-size-asian="14pt" style:font-size-complex="14pt"/>
    </style:style>
    <style:style style:name="T48" style:family="text">
      <style:text-properties fo:font-size="18pt" fo:letter-spacing="-0.007cm" fo:font-weight="bold" style:font-size-asian="18pt" style:font-weight-asian="bold" style:font-size-complex="18pt"/>
    </style:style>
    <style:style style:name="T49" style:family="text">
      <style:text-properties fo:font-size="18pt" fo:letter-spacing="-0.004cm" fo:font-weight="bold" style:font-size-asian="18pt" style:font-weight-asian="bold" style:font-size-complex="18pt"/>
    </style:style>
    <style:style style:name="T50" style:family="text">
      <style:text-properties fo:font-size="18pt" fo:letter-spacing="-0.009cm" fo:font-weight="bold" style:font-size-asian="18pt" style:font-weight-asian="bold" style:font-size-complex="18pt" style:font-weight-complex="normal"/>
    </style:style>
    <style:style style:name="T51" style:family="text">
      <style:text-properties fo:font-size="16pt" fo:letter-spacing="-0.009cm" fo:font-weight="bold" style:font-size-asian="16pt" style:font-weight-asian="bold" style:font-size-complex="16pt"/>
    </style:style>
    <style:style style:name="T52" style:family="text">
      <style:text-properties fo:font-size="16pt" fo:letter-spacing="-0.009cm" fo:font-weight="bold" style:font-size-asian="16pt" style:font-weight-asian="bold" style:font-size-complex="16pt"/>
    </style:style>
    <style:style style:name="T53" style:family="text">
      <style:text-properties fo:font-size="16pt" fo:letter-spacing="-0.009cm" fo:font-weight="bold" style:font-size-asian="16pt" style:font-weight-asian="bold" style:font-size-complex="16pt" style:font-weight-complex="normal"/>
    </style:style>
    <style:style style:name="T54" style:family="text">
      <style:text-properties fo:font-size="16pt" fo:letter-spacing="-0.009cm" fo:font-weight="normal" style:font-size-asian="16pt" style:font-weight-asian="normal" style:font-size-complex="16pt" style:font-weight-complex="normal"/>
    </style:style>
    <style:style style:name="T55" style:family="text">
      <style:text-properties fo:font-size="16pt" fo:letter-spacing="-0.009cm" fo:font-weight="normal" officeooo:rsid="001e8121" style:font-size-asian="16pt" style:font-weight-asian="normal" style:font-size-complex="16pt" style:font-weight-complex="normal"/>
    </style:style>
    <style:style style:name="T56" style:family="text">
      <style:text-properties fo:font-size="16pt" fo:letter-spacing="-0.009cm" fo:font-weight="normal" style:font-size-asian="16pt" style:font-weight-asian="normal" style:font-size-complex="16pt" style:font-weight-complex="normal"/>
    </style:style>
    <style:style style:name="T57" style:family="text">
      <style:text-properties fo:font-size="16pt" fo:letter-spacing="-0.009cm" fo:font-weight="normal" officeooo:rsid="001a9f58" style:font-size-asian="16pt" style:font-weight-asian="normal" style:font-size-complex="16pt" style:font-weight-complex="normal"/>
    </style:style>
    <style:style style:name="T58" style:family="text">
      <style:text-properties fo:font-size="16pt" fo:letter-spacing="-0.009cm" fo:font-weight="normal" officeooo:rsid="001ff672" style:font-size-asian="16pt" style:font-weight-asian="normal" style:font-size-complex="16pt" style:font-weight-complex="normal"/>
    </style:style>
    <style:style style:name="T59" style:family="text">
      <style:text-properties fo:font-size="16pt" fo:letter-spacing="-0.009cm" style:font-size-asian="16pt" style:font-size-complex="16pt"/>
    </style:style>
    <style:style style:name="T60" style:family="text">
      <style:text-properties fo:font-size="16pt" fo:letter-spacing="-0.009cm" officeooo:rsid="001e8121" style:font-size-asian="16pt" style:font-size-complex="16pt"/>
    </style:style>
    <style:style style:name="T61" style:family="text">
      <style:text-properties fo:font-size="16pt" fo:letter-spacing="-0.009cm" style:font-size-asian="16pt" style:font-size-complex="16pt"/>
    </style:style>
    <style:style style:name="T62" style:family="text">
      <style:text-properties fo:font-size="16pt" fo:letter-spacing="-0.004cm" fo:font-weight="normal" style:font-size-asian="16pt" style:font-weight-asian="normal" style:font-size-complex="16pt" style:font-weight-complex="normal"/>
    </style:style>
    <style:style style:name="T63" style:family="text">
      <style:text-properties fo:font-size="16pt" fo:letter-spacing="-0.039cm" fo:font-weight="normal" style:font-size-asian="16pt" style:font-weight-asian="normal" style:font-size-complex="16pt" style:font-weight-complex="normal"/>
    </style:style>
    <style:style style:name="T64" style:family="text">
      <style:text-properties fo:font-size="16pt" fo:letter-spacing="-0.023cm" fo:font-weight="normal" style:font-size-asian="16pt" style:font-weight-asian="normal" style:font-size-complex="16pt" style:font-weight-complex="normal"/>
    </style:style>
    <style:style style:name="T65" style:family="text">
      <style:text-properties fo:font-size="16pt" fo:letter-spacing="-0.019cm" fo:font-weight="normal" style:font-size-asian="16pt" style:font-weight-asian="normal" style:font-size-complex="16pt" style:font-weight-complex="normal"/>
    </style:style>
    <style:style style:name="T66" style:family="text">
      <style:text-properties fo:font-size="16pt" fo:letter-spacing="-0.016cm" fo:font-weight="normal" style:font-size-asian="16pt" style:font-weight-asian="normal" style:font-size-complex="16pt" style:font-weight-complex="normal"/>
    </style:style>
    <style:style style:name="T67" style:family="text">
      <style:text-properties fo:font-size="16pt" fo:letter-spacing="-0.028cm" fo:font-weight="normal" style:font-size-asian="16pt" style:font-weight-asian="normal" style:font-size-complex="16pt" style:font-weight-complex="normal"/>
    </style:style>
    <style:style style:name="T68" style:family="text">
      <style:text-properties fo:letter-spacing="-0.026cm" fo:font-weight="bold" style:font-weight-asian="bold" style:font-weight-complex="bold"/>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span text:style-name="T10">AI POWERED GEOSPATIAL INTELLIGENCE SYSTEM FOR SATELLITE-BASED CHANGE DETECTION, THREAT ASSESSMENT AND DECISION SUPPORT</text:span></text:h>
      <text:h text:style-name="P3" text:outline-level="2"><draw:frame draw:style-name="fr1" draw:name="Image 1" text:anchor-type="char" svg:x="4.962cm" svg:y="0.845cm" svg:width="7.253cm" svg:height="7.174cm" draw:z-index="0"><draw:image xlink:href="Pictures/100000010000017C0000017C6B31E494ACE73B03.png" xlink:type="simple" xlink:show="embed" xlink:actuate="onLoad" draw:mime-type="image/png"/><svg:desc>C:\Users\MACHANI SAI HITESH\Desktop\Ima\CEMILAC.png</svg:desc></draw:frame></text:h>
      <text:h text:style-name="P6" text:outline-level="2"><text:span text:style-name="T13">CENTER</text:span><text:span text:style-name="T14"> </text:span><text:span text:style-name="T13">FOR</text:span><text:span text:style-name="T14"> </text:span><text:span text:style-name="T13">MILITARY</text:span><text:span text:style-name="T14"> </text:span><text:span text:style-name="T13">AIRWORTHINESS</text:span><text:span text:style-name="T15"> </text:span><text:span text:style-name="T13">&amp; </text:span><text:span text:style-name="T16">CERTIFICATION</text:span></text:h>
      <text:p text:style-name="P27"><text:span text:style-name="T16">(CEMILAC)</text:span><text:span text:style-name="T17"> </text:span><text:span text:style-name="T13">DEFENCE RESEARCH AND DEVELOPMENT ORGANISATION (DRDO) MINISTRY OF DEFENCE, GOVERNMENT OF INDIA, MARATHAHALLI COLLONY POST, BENGALURU-560037</text:span></text:p>
      <text:p text:style-name="P27"><text:span text:style-name="T13"/></text:p>
      <text:h text:style-name="P7" text:outline-level="3"><text:span text:style-name="T19"/></text:h>
      <text:h text:style-name="P7" text:outline-level="3"><text:span text:style-name="T19">SUBMITTED</text:span><text:span text:style-name="T20"> </text:span><text:span text:style-name="T21">BY: <text:s text:c="53"/>RECEIVED AND APPROVED BY:</text:span></text:h>
      <text:h text:style-name="P8" text:outline-level="3"><text:span text:style-name="T22">ABHINAV GUPTA <text:s text:c="51"/></text:span><text:span text:style-name="T25">Shri</text:span><text:span text:style-name="T32"> </text:span><text:span text:style-name="T25">SANYASI</text:span><text:span text:style-name="T35"> </text:span><text:span text:style-name="T25">RAO</text:span><text:span text:style-name="T38"> </text:span><text:span text:style-name="T25">RUPITI,</text:span><text:span text:style-name="T41"> [RA2411003010560]<text:tab/><text:tab/><text:tab/> <text:s text:c="24"/></text:span><text:span text:style-name="T25">Scientist ‘E’</text:span></text:h>
      <text:h text:style-name="P8" text:outline-level="3"><text:span text:style-name="T25"/></text:h>
      <text:h text:style-name="P1" text:outline-level="1"><text:soft-page-break/><text:span text:style-name="T48">AN INTERNSHIP </text:span><text:span text:style-name="T49">REPORT</text:span></text:h>
      <text:h text:style-name="P1" text:outline-level="1"><text:span text:style-name="T49"/></text:h>
      <text:p text:style-name="P28"><text:span text:style-name="T51">Internship Organization: </text:span><text:span text:style-name="T62">DRDO, </text:span><text:span text:style-name="T54">CEMILAC (Center for military </text:span><text:span text:style-name="T62">Airworthiness</text:span><text:span text:style-name="T63"> </text:span><text:span text:style-name="T62">&amp; Certification)</text:span></text:p>
      <text:p text:style-name="P28"><text:span text:style-name="T62"/></text:p>
      <text:p text:style-name="P38"><text:span text:style-name="T51">Submitted By: </text:span><text:span text:style-name="T55">Abhinav Gupta [RA2411003010560]</text:span></text:p>
      <text:p text:style-name="P38"><text:span text:style-name="T59"><text:s text:c="27"/>Computer Science and </text:span><text:span text:style-name="T60">Engineering (CSE Core)</text:span></text:p>
      <text:p text:style-name="P28"><text:span text:style-name="T54"><text:s text:c="27"/>SRM Institute of Science and Technology, <text:tab/><text:tab/><text:tab/><text:tab/><text:tab/><text:tab/>Kattankulathur</text:span></text:p>
      <text:p text:style-name="P28"><text:span text:style-name="T54"/></text:p>
      <text:p text:style-name="P28"><text:span text:style-name="T53">Guided By: </text:span><text:span text:style-name="T54">Shri</text:span><text:span text:style-name="T64">. </text:span><text:span text:style-name="T54">Sanyasi</text:span><text:span text:style-name="T65"> </text:span><text:span text:style-name="T54">Rao</text:span><text:span text:style-name="T66"> </text:span><text:span text:style-name="T54">Rupiti,</text:span><text:span text:style-name="T67"> </text:span><text:span text:style-name="T54">Scientist ‘E’</text:span></text:p>
      <text:p text:style-name="P28"><text:span text:style-name="T54"/></text:p>
      <text:p text:style-name="P28"><text:span text:style-name="T53">Internship Duration:</text:span><text:span text:style-name="T54"> </text:span><text:span text:style-name="T57">0</text:span><text:span text:style-name="T54">3 June 2026 – </text:span><text:span text:style-name="T57">0</text:span><text:span text:style-name="T54">3 July 2026 </text:span><text:span text:style-name="T58">[1 Month]</text:span></text:p>
      <text:p text:style-name="P28"><text:span text:style-name="T58"/></text:p>
      <text:p text:style-name="P31"><text:span text:style-name="T53">Date of Submisson:</text:span><text:span text:style-name="T54"> 3 July 2026</text:span></text:p>
      <text:p text:style-name="P28"><text:span text:style-name="T54"/></text:p>
      <text:p text:style-name="P28"><text:span text:style-name="T54"/></text:p>
      <text:p text:style-name="P28"><text:span text:style-name="T54"/></text:p>
      <text:h text:style-name="P10" text:outline-level="3"><text:span text:style-name="T11">SUBMITTED</text:span><text:span text:style-name="T68"> </text:span><text:span text:style-name="T23">BY: <text:s/></text:span><text:span text:style-name="T24"><text:s text:c="38"/><text:tab/> <text:s text:c="6"/></text:span><text:span text:style-name="T23">RECEIVED AND APPROVED BY:</text:span></text:h>
      <text:h text:style-name="P8" text:outline-level="3"><text:span text:style-name="T54">ABHINAV GUPTA <text:s text:c="29"/><text:tab/> <text:s text:c="5"/></text:span><text:span text:style-name="T31">Shri</text:span><text:span text:style-name="T34"> </text:span><text:span text:style-name="T31">SANYASI</text:span><text:span text:style-name="T37"> </text:span><text:span text:style-name="T31">RAO</text:span><text:span text:style-name="T40"> </text:span><text:span text:style-name="T31">RUPITI, <text:s text:c="80"/></text:span><text:span text:style-name="T44"><text:s text:c="6"/></text:span><text:span text:style-name="T45">[</text:span><text:span text:style-name="T44">RA2411003010560]<text:tab/><text:tab/><text:tab/><text:tab/> <text:s text:c="7"/></text:span><text:span text:style-name="T31">Scientist ‘E’</text:span></text:h>
      <text:h text:style-name="P9" text:outline-level="3"><text:soft-page-break/><text:span text:style-name="T50">DECLARATION</text:span></text:h>
      <text:p text:style-name="P39"><text:span text:style-name="T28">I, </text:span><text:span text:style-name="T29">Abhinav Gupta (RA2411003010560</text:span><text:span text:style-name="T28">), student of </text:span><text:span text:style-name="T29">5t</text:span><text:span text:style-name="T28">h Semester, Bachelor of Technology in Computer Science and </text:span><text:span text:style-name="T29">Engineering (CSE Core)</text:span><text:span text:style-name="T28">, </text:span><text:span text:style-name="T30">SRM</text:span><text:span text:style-name="T28"> </text:span><text:span text:style-name="T30">Institute of Science and Technology</text:span><text:span text:style-name="T28">, </text:span><text:span text:style-name="T30">Kattankulathur,</text:span><text:span text:style-name="T28"> hereby declare that the internship project titled </text:span><text:span text:style-name="Strong_20_Emphasis"><text:span text:style-name="T28">“</text:span></text:span><text:span text:style-name="Strong_20_Emphasis"><text:span text:style-name="T18">AI POWERED GEOSPATIAL INTELLIGENCE SYSTEM FOR SATELLITE-BASED CHANGE DETECTION, THREAT ASSESSMENT AND DECISION SUPPORT</text:span></text:span><text:span text:style-name="Strong_20_Emphasis"><text:span text:style-name="T28">”</text:span></text:span><text:span text:style-name="T28"> has been carried out by me as part of my internship work.</text:span></text:p>
      <text:p text:style-name="P40"><text:span text:style-name="T3"/></text:p>
      <text:p text:style-name="P40"><text:span text:style-name="T46">I further declare that the work presented in this dissertation is original to the best of my knowledge and has been completed under the prescribed academic and institutional guidelines.</text:span></text:p>
      <text:p text:style-name="P41">I also declare that the contents of this dissertation have not been submitted previously by me or, to the best of my knowledge, by any other person for the award of any degree, diploma, or similar academic qualification at any other university or institution.</text:p>
      <text:p text:style-name="P41">Furthermore, I declare that any Intellectual Property Rights generated from this project carried out at CEMILAC, Bengaluru, shall be the property of DRDO (CEMILAC), Bengaluru. I acknowledge that I am the author of the submitted work and that the project outcomes, documents, and related intellectual contributions shall be governed by the applicable rules and policies of DRDO (CEMILAC).</text:p>
      <text:p text:style-name="P29"><text:span text:style-name="T26"/></text:p>
      <text:p text:style-name="P30"><text:span text:style-name="T26"/></text:p>
      <text:p text:style-name="P30"><text:span text:style-name="T26"/></text:p>
      <text:p text:style-name="P30"><text:span text:style-name="T26"/></text:p>
      <text:p text:style-name="P30"><text:span text:style-name="T26"/></text:p>
      <text:p text:style-name="P24"><text:span text:style-name="T11">Prepared by: <text:s text:c="2"/></text:span><text:s text:c="63"/><text:span text:style-name="T11"><text:s/>Reviewed and Approved by:</text:span></text:p>
      <text:p text:style-name="P26"/>
      <text:p text:style-name="P24"><text:span text:style-name="T4">Abhinav Gupta <text:s text:c="68"/></text:span><text:span text:style-name="T5">Shri. Sanyasi Rao Rupiti, </text:span></text:p>
      <text:p text:style-name="P24"><text:span text:style-name="T5">(</text:span><text:span text:style-name="T4">RA2411003010560</text:span><text:span text:style-name="T5">) <text:s text:c="60"/>Sc ‘E’ <text:s text:c="32"/></text:span><text:span text:style-name="T4"><text:tab/><text:tab/><text:tab/><text:tab/><text:tab/><text:tab/><text:tab/><text:tab/><text:tab/></text:span></text:p>
      <text:p text:style-name="P24"><text:span text:style-name="T4"/></text:p>
      <text:h text:style-name="P4" text:outline-level="2"><text:soft-page-break/><text:span text:style-name="T6">ACKNOWLEDGEMENT</text:span></text:h>
      <text:h text:style-name="P5" text:outline-level="2"><text:span text:style-name="T1"/></text:h>
      <text:h text:style-name="P5" text:outline-level="2"><text:span text:style-name="T1"/></text:h>
      <text:p text:style-name="P40"><text:span text:style-name="T47">I would like to express my sincere gratitude to the Centre for Military Airworthiness and Certification (CEMILAC), DRDO, for providing me with the valuable opportunity to undertake this project titled </text:span><text:span text:style-name="Strong_20_Emphasis"><text:span text:style-name="T47">“AI-Powered Geospatial Intelligence System for Satellite-Based Change Detection, Threat Assessment, and Decision Support.”</text:span></text:span><text:span text:style-name="T47"> This project has been a highly enriching learning experience and has helped me gain practical knowledge in the areas of satellite image analysis, geospatial intelligence, artificial intelligence, change detection, threat assessment, and decision-support system development.</text:span></text:p>
      <text:p text:style-name="P40"><text:span text:style-name="T47">I am deeply grateful to my project guide, </text:span><text:span text:style-name="Strong_20_Emphasis"><text:span text:style-name="T47">Shri Sanyasi Rao Rupiti, Scientist ‘E’</text:span></text:span><text:span text:style-name="T47">, for his constant support, valuable guidance, encouragement, and technical advice throughout the project work. His mentorship played a significant role in helping me understand the practical aspects of AI-based geospatial analysis, satellite-based monitoring, and the development of an intelligent decision-support platform for identifying and assessing changes in geospatial imagery.</text:span></text:p>
      <text:p text:style-name="P42">I would like to thank all the officials and staff members of DRDO (CEMILAC) for their cooperation, assistance, and the knowledge they shared with me during the course of this project. Their support and professional guidance helped me gain valuable exposure to real-world defence-oriented applications of artificial intelligence and geospatial technologies.</text:p>
      <text:p text:style-name="P42">This project has not only enriched my academic understanding but has also enhanced my confidence in applying theoretical knowledge to practical and real-world problem domains. I am truly thankful for the exposure and learning experience received at CEMILAC, which will serve as a strong foundation for my future academic and professional career.</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32"><text:soft-page-break/><text:span text:style-name="T6">T</text:span><text:span text:style-name="T7">ABLE OF CONTENTS</text:span></text:p>
      <text:p text:style-name="P13"/>
      <text:p text:style-name="P13"/>
      <text:p text:style-name="P14"><text:span text:style-name="T2">CHAPTER 1: INTRODUCTION…………………………………………………………………. 1</text:span></text:p>
      <text:p text:style-name="P14"><text:span text:style-name="T2">1.1 BACKGROUND………………..……………………………………………… 1</text:span></text:p>
      <text:p text:style-name="P14"><text:span text:style-name="T2">1.2 NEED FOR AUTOMATED CHANGE DETECTION………………………… 2</text:span></text:p>
      <text:p text:style-name="P14"><text:span text:style-name="T2">1.3 ARTIFICIAL INTELLIGENCE IN GEOSPATIAL INTELLIGENCE...………. 3</text:span></text:p>
      <text:p text:style-name="P14"><text:span text:style-name="T2">1.4 MOTIVATION…………………………………………………………………. 5</text:span></text:p>
      <text:p text:style-name="P14"><text:span text:style-name="T2">1.5 OBJECTIVES…………………………………………………………………... 6</text:span></text:p>
      <text:p text:style-name="P14"><text:span text:style-name="T2">1.6 SCOPE………………………………………………………………………….. 8</text:span></text:p>
      <text:p text:style-name="P15"><text:span text:style-name="T2">1.7 ORGANISATION OF REPORT……………………………………………… 11</text:span></text:p>
      <text:p text:style-name="P15"><text:span text:style-name="T2"/></text:p>
      <text:p text:style-name="P15"><text:span text:style-name="T2">CHAPTER 2: PROBLEM STATEMENT………………………………………………………. 13</text:span></text:p>
      <text:p text:style-name="P15"><text:span text:style-name="T2">2.1 EXISTING SYSTEM…………………………………………………………. 13</text:span></text:p>
      <text:p text:style-name="P15"><text:span text:style-name="T2">2.2 PROBLEMS IN EXISTING SYSTEM……………………………………….. 14</text:span></text:p>
      <text:p text:style-name="P15"><text:span text:style-name="T2">2.3 PROPOSED SOLUTION……………………………………………………... 16</text:span></text:p>
      <text:p text:style-name="P15"><text:span text:style-name="T2">2.4 ADVANTAGES OF PROPOSED SOLUTION………………………………. 20</text:span></text:p>
      <text:p text:style-name="P15"><text:span text:style-name="T2">2.5 APPLICATIONS..…………………………………………………………….. 21</text:span></text:p>
      <text:p text:style-name="P15"><text:span text:style-name="T2"/></text:p>
      <text:p text:style-name="P15"><text:span text:style-name="T2">CHAPTER 3: PROJECT REQUIREMENT SPECIFICATIONS………………………………... 23</text:span></text:p>
      <text:p text:style-name="P15"><text:span text:style-name="T2">3.1 FUNCTIONAL REQUIREMENTS…………………………………………... 23</text:span></text:p>
      <text:p text:style-name="P15"><text:span text:style-name="T2">3.2 NON-FUNCTIONAL REQUIREMENTS…...……………………………….. 24</text:span></text:p>
      <text:p text:style-name="P15"><text:span text:style-name="T2">3.3 HARDWARE REQUIREMENTS………………………………………….… 25</text:span></text:p>
      <text:p text:style-name="P15"><text:span text:style-name="T2">3.4 SOFTWARE REQUIREMENTS……………………………………………... 26</text:span></text:p>
      <text:p text:style-name="P16"><text:span text:style-name="T2">3.5 SYSTEM CONSTRAINTS…………………………………………………… 28</text:span></text:p>
      <text:p text:style-name="P16"><text:span text:style-name="T2">3.6 ASSUMPTIONS…………………………………………………………….... 29</text:span></text:p>
      <text:p text:style-name="P16"><text:span text:style-name="T2"/></text:p>
      <text:p text:style-name="P16"><text:span text:style-name="T2">CHAPTER 4: SYSTEM DESIGN……………………………………………………………….. 31</text:span></text:p>
      <text:p text:style-name="P16"><text:span text:style-name="T2">4.1 OVERALL SYSTEM ARCHITECTURE……………………………………. 31</text:span></text:p>
      <text:p text:style-name="P16"><text:span text:style-name="T2">4.2 MODULE DESIGN………………………………………………………….. 33</text:span></text:p>
      <text:p text:style-name="P16"><text:span text:style-name="T2">4.3 DATA FLOW DIAGRAM (DFD)…………………………………………… 36</text:span></text:p>
      <text:p text:style-name="P16"><text:span text:style-name="T2">4.4 USE CASE DIAGRAM…………………………………………………….... 38</text:span></text:p>
      <text:p text:style-name="P16"><text:span text:style-name="T2">4.5 ACTIVITY DIAGRAM…………………………………………………….... 41</text:span></text:p>
      <text:p text:style-name="P16"><text:span text:style-name="T2">4.6 SEQUENCE DIAGRAM…………………………………………………..… 43</text:span></text:p>
      <text:p text:style-name="P16"><text:span text:style-name="T2">4.7 DATABASE DESIGN……………………………………………………..… 46</text:span></text:p>
      <text:p text:style-name="P16"><text:span text:style-name="T2"/></text:p>
      <text:p text:style-name="P16"><text:span text:style-name="T2">CHAPTER 5: PROPOSED METHODOLOGY…………………………………………………. 50</text:span></text:p>
      <text:p text:style-name="P16"><text:span text:style-name="T2">5.1 WORKFLOW……………………………………………………………….... 50</text:span></text:p>
      <text:p text:style-name="P16"><text:span text:style-name="T2">5.2 IMAGE ACQUISITION……………………………………………………… 52</text:span></text:p>
      <text:p text:style-name="P16"><text:span text:style-name="T2">5.3 IMAGE PREPROCESSING………………………………………………….. 52</text:span></text:p>
      <text:p text:style-name="P16"><text:span text:style-name="T2">5.4 CLASSICAL CHANGE DETECTION………………………………………. 53</text:span></text:p>
      <text:p text:style-name="P17"><text:span text:style-name="T2">5.5 SIAMESE U-NET FOR CHANGE DETECTION………………………….... 54</text:span></text:p>
      <text:p text:style-name="P17"><text:span text:style-name="T2"/></text:p>
      <text:p text:style-name="P17"><text:span text:style-name="T2">CHAPTER 6: IMPLEMENTATION AND CODE……………………………………………… 55</text:span></text:p>
      <text:p text:style-name="P17"><text:span text:style-name="T2">6.1 DEVELOPMENT ENVIRONMENT………………………………………… 55</text:span></text:p>
      <text:p text:style-name="P17"><text:span text:style-name="T2">6.2 FOLDER STRUCTURE…………………………………………………….... 56</text:span></text:p>
      <text:p text:style-name="P17"><text:span text:style-name="T2">6.3 STREAMLIT DASHBOARD………………………………………………... 57</text:span></text:p>
      <text:p text:style-name="P17"><text:span text:style-name="T2">6.4 IMAGE UPLOAD CODE………………………………………………….… 59</text:span></text:p>
      <text:p text:style-name="P17"><text:span text:style-name="T2">6.5 PREPROCESSING CODE………………………………………………….... 60</text:span></text:p>
      <text:p text:style-name="P17"><text:span text:style-name="T2">6.6 CHANGE DETECTION CODE…………………………………………….... 63</text:span></text:p>
      <text:p text:style-name="P17"><text:span text:style-name="T2"/></text:p>
      <text:p text:style-name="P17"><text:soft-page-break/><text:span text:style-name="T2">CHAPTER 7: RESULTS AND DISCUSSION………………………………………………….. 67</text:span></text:p>
      <text:p text:style-name="P17"><text:span text:style-name="T2">7.1 EXPERIMENTAL SETUP…………………………………………………… 67</text:span></text:p>
      <text:p text:style-name="P17"><text:span text:style-name="T2">7.2 TEST CASES…………………………………………………………………. 68</text:span></text:p>
      <text:p text:style-name="P18"><text:span text:style-name="T2">7.3 OUTPUT SCREENSHOTS……....…..……………………………………..… 70</text:span></text:p>
      <text:p text:style-name="P18"><text:span text:style-name="T2"/></text:p>
      <text:p text:style-name="P18"><text:span text:style-name="T2">CHAPTER 8: CONCLUSION AND FUTURE WORK………………………………………... 73</text:span></text:p>
      <text:p text:style-name="P18"><text:span text:style-name="T2">8.1 CONCLUSION……………………………………………………………… 73</text:span></text:p>
      <text:p text:style-name="P18"><text:span text:style-name="T2">8.2 LIMITATIONS…………………………………………………………….... 73</text:span></text:p>
      <text:p text:style-name="P18"><text:span text:style-name="T2">8.3 FUTURE WORK……………………………………………………………. 74</text:span></text:p>
      <text:p text:style-name="P18"><text:span text:style-name="T2"/></text:p>
      <text:p text:style-name="P17"><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25"><text:span text:style-name="T2"/></text:p>
      <text:p text:style-name="P25"><text:span text:style-name="T2"/></text:p>
      <text:p text:style-name="P25"><text:span text:style-name="T2"/></text:p>
      <text:p text:style-name="P16"><text:span text:style-name="T2"/></text:p>
      <text:p text:style-name="P33"><text:soft-page-break/><text:span text:style-name="T7">LIST OF TABLES</text:span></text:p>
      <text:p text:style-name="P19"><text:span text:style-name="T2"/></text:p>
      <text:p text:style-name="P21"><text:span text:style-name="T2">TABLE 3.1 SOFTWARE REQUIREMENTS…………………………...……………………… 26</text:span></text:p>
      <text:p text:style-name="P21"><text:span text:style-name="T2">TABLE 3.2 ASSUMPTIONS OF THE PROPOSED SYSTEM………………………………… 30</text:span></text:p>
      <text:p text:style-name="P21"><text:span text:style-name="T2"/></text:p>
      <text:p text:style-name="P21"><text:span text:style-name="T2">TABLE 4.1 DESCRIPTION OF SYSTEM MODULES………………………………………… 33</text:span></text:p>
      <text:p text:style-name="P21"><text:span text:style-name="T2">TABLE 4.2 <text:s/>DESCRIPTION OF SYSTEM MODULES…...…………………………………… 34</text:span></text:p>
      <text:p text:style-name="P21"><text:span text:style-name="T2">TABLE 4.3 DESCRIPTION OF LEVEL 0 DFD………………………………………………... 36</text:span></text:p>
      <text:p text:style-name="P21"><text:span text:style-name="T2">TABLE 4.4 DESCRIPTION OF LEVEL 1 PROCESSES………………………………………. 38</text:span></text:p>
      <text:p text:style-name="P21"><text:span text:style-name="T2">TABLE 4.5 MAJOR USE CASES…………………………………………………………….… 39</text:span></text:p>
      <text:p text:style-name="P22"><text:span text:style-name="T2">TABLE 4.6 ACTIVITY FLOW OF THE PROPOSED SYSTEM………………………………. 42</text:span></text:p>
      <text:p text:style-name="P22"><text:span text:style-name="T2">TABLE 4.7 COMPONENTS OF THE SEQUENCE DIAGRAM………………………………. 44</text:span></text:p>
      <text:p text:style-name="P22"><text:span text:style-name="T2">TABLE 4.8 SEQUENCE OF SYSTEM OPERATIONS……………………………………….... 45</text:span></text:p>
      <text:p text:style-name="P22"><text:span text:style-name="T2">TABLE 4.9 DETECTION TABLE……………………………………………………………….47</text:span></text:p>
      <text:p text:style-name="P22"><text:span text:style-name="T2">TABLE 4.10 SAMPLE DETECTION RECORDS……………………………………………… 48</text:span></text:p>
      <text:p text:style-name="P22"><text:span text:style-name="T2">TABLE 4.11 OPERATIONS ON THE SQLITE DATABASE………………………………….. 48</text:span></text:p>
      <text:p text:style-name="P22"><text:span text:style-name="T2"/></text:p>
      <text:p text:style-name="P22"><text:span text:style-name="T2">TABLE 5.1 WORKFLOW SUMMARY…...…………………………………………………… 51</text:span></text:p>
      <text:p text:style-name="P22"><text:span text:style-name="T2">TABLE 5.2 IMAGE PREPROCESSING OPERATIONS………………………………………. 52</text:span></text:p>
      <text:p text:style-name="P23"><text:span text:style-name="T2">TABLE 5.3 CLASSICAL CHANGE DETECTION STEPS…………………………………….. 53</text:span></text:p>
      <text:p text:style-name="P23"><text:span text:style-name="T2"/></text:p>
      <text:p text:style-name="P23"><text:span text:style-name="T2">TABLE 6.1 DEVELOPMENT ENVIRONMENT…………………………………………….… 55</text:span></text:p>
      <text:p text:style-name="P23"><text:span text:style-name="T2">TABLE 6.2 FUNCTION AND PURPOSE…………………………………………………….... 60</text:span></text:p>
      <text:p text:style-name="P23"><text:span text:style-name="T2">TABLE 6.3 FUNCTION AND PURPOSE…………………………………………………….... 62</text:span></text:p>
      <text:p text:style-name="P23"><text:span text:style-name="T2"/></text:p>
      <text:p text:style-name="P23"><text:span text:style-name="T2">TABLE 7.1 HARDWARE CONFIGURATION……………………………………………….... 67</text:span></text:p>
      <text:p text:style-name="P23"><text:span text:style-name="T2">TABLE 7.2 TEST CASES………………………………………………………………………. 68</text:span></text:p>
      <text:p text:style-name="P23"><text:span text:style-name="T2"/></text:p>
      <text:p text:style-name="P20"><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34"><text:soft-page-break/><text:span text:style-name="T7">LIST OF FIGURES</text:span></text:p>
      <text:p text:style-name="P34"><text:span text:style-name="T7"/></text:p>
      <text:p text:style-name="P35"><text:span text:style-name="T7">FIGUR</text:span><text:span text:style-name="T8">E 4.1 OVERALL SYSTEM ARCHITECTURE………………………………………… 32</text:span></text:p>
      <text:p text:style-name="P36"><text:span text:style-name="T7">FIGURE 4.2 ANALYST AND AUTOMATED SYSTEM……………………………………… 40</text:span></text:p>
      <text:p text:style-name="P36"><text:span text:style-name="T7">FIGURE 4.3 ACTIVITY DIAGRAM………………………………………………………….... 41</text:span></text:p>
      <text:p text:style-name="P36"><text:span text:style-name="T7">FIGURE 4.4 SEQUENCE DIAGRAM………………………………………………………….. 44</text:span></text:p>
      <text:p text:style-name="P36"><text:span text:style-name="T7"/></text:p>
      <text:p text:style-name="P36"><text:span text:style-name="T7">FIGURE 5.1 WORKFLOW DIAGRAM………………………………………………………... 50</text:span></text:p>
      <text:p text:style-name="P36"><text:span text:style-name="T7"/></text:p>
      <text:p text:style-name="P36"><text:span text:style-name="T7">FIGURE </text:span><text:span text:style-name="T9">6.1 FOLDER STRUCTURE………………………………………………………...… 57</text:span></text:p>
      <text:p text:style-name="P37"><text:span text:style-name="T7">FIGURE 6.2 STREAMLIT DASHBOARD HOME PAGE……………………………………... 58</text:span></text:p>
      <text:p text:style-name="P37"><text:span text:style-name="T7">FIGURE 6.3 STREAMLIT DASHBOARD UPLOAD AND ANALYZE…………………….… 58</text:span></text:p>
      <text:p text:style-name="P37"><text:span text:style-name="T7">FIGURE 6.4 ALERT HISTORY………………………………………………………………… 59</text:span></text:p>
      <text:p text:style-name="P37"><text:span text:style-name="T7">FIGURE 6.5 IMAGE UPLOAD CODE…………………………………………………………. 59</text:span></text:p>
      <text:p text:style-name="P37"><text:span text:style-name="T7">FIGURE 6.6 PREPROCESSING CODE……………………………………………………….... 61</text:span></text:p>
      <text:p text:style-name="P37"><text:span text:style-name="T7">FIGURE 6.7 CHANGE DETECTION CODE……...…………………………………………… 63</text:span></text:p>
      <text:p text:style-name="P37"><text:span text:style-name="T7"/></text:p>
      <text:p text:style-name="P37"><text:span text:style-name="T7">FIGURE 7.1 OUTPUT SCREENSHOTS……………………………………………………..… 70</text:span></text:p>
      <text:p text:style-name="P37"><text:span text:style-name="T7">FIGURE 7.2 IMAGE UPLOAD…………………………………………………………………. 71</text:span></text:p>
      <text:p text:style-name="P37"><text:span text:style-name="T7">FIGURE 7.3 CHANGE DETECTION…………………………………………………………... 71</text:span></text:p>
      <text:p text:style-name="P37"><text:span text:style-name="T7">FIGURE 7.4 AI EXPLANATION……………………………………………………………….. 72</text:span></text:p>
      <text:p text:style-name="P37"><text:span text:style-name="T7">FIGURE 7.5 ANALYST REVIEW……………………………………………………………… 72</text:span></text:p>
      <text:p text:style-name="P37"><text:span text:style-name="T7"/></text:p>
      <text:p text:style-name="P11"><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style:default-outline-level="2" style:list-style-name="" style:class="text">
      <style:paragraph-properties fo:margin-left="0.279cm" fo:margin-right="0cm" fo:text-align="center" style:justify-single-word="false" fo:text-indent="0cm" style:auto-text-indent="false"/>
      <style:text-properties fo:font-size="20pt" style:font-size-asian="20pt" style:font-size-complex="20pt"/>
    </style:style>
    <style:style style:name="Heading_20_3" style:display-name="Heading 3" style:family="paragraph" style:parent-style-name="Standard" style:default-outline-level="3" style:list-style-name="" style:class="text">
      <style:text-properties fo:font-size="14pt" style:font-size-asian="14pt" style:font-size-complex="14pt"/>
    </style:style>
    <style:style style:name="Heading_20_1" style:display-name="Heading 1" style:family="paragraph" style:parent-style-name="Standard" style:default-outline-level="1" style:list-style-name="" style:class="text">
      <style:paragraph-properties fo:margin-left="0.279cm" fo:margin-right="0.258cm" fo:margin-top="0.108cm" fo:margin-bottom="0cm" style:contextual-spacing="false" fo:text-align="center" style:justify-single-word="false" fo:text-indent="0cm" style:auto-text-indent="false"/>
      <style:text-properties fo:font-size="20pt" fo:font-weight="bold" style:font-size-asian="20pt" style:font-weight-asian="bold" style:font-size-complex="20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30T14:42:34.963597025</meta:creation-date>
    <dc:date>2026-06-30T14:46:49.864400955</dc:date>
    <meta:editing-duration>PT4M15S</meta:editing-duration>
    <meta:editing-cycles>1</meta:editing-cycles>
    <meta:document-statistic meta:table-count="0" meta:image-count="1" meta:object-count="0" meta:page-count="8" meta:paragraph-count="119" meta:word-count="1036" meta:character-count="9282" meta:non-whitespace-character-count="7755"/>
    <meta:generator>LibreOffice/7.3.7.2$Linux_X86_64 LibreOffice_project/30$Build-2</meta:generator>
  </office:meta>
</office:document-meta>
</file>